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weight="bold" style:font-weight-asian="bold" style:font-weight-complex="bold"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weight="bold" style:font-weight-asian="bold" style:font-weight-complex="bold"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weight="bold" style:font-weight-asian="bold" style:font-weight-complex="bold" fo:font-size="14pt" style:font-size-asian="14pt" style:font-size-complex="14pt"/>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weight="bold" style:font-weight-asian="bold" style:font-weight-complex="bold"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weight="bold" style:font-weight-asian="bold" style:font-weight-complex="bold"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weight="bold" style:font-weight-asian="bold" style:font-weight-complex="bold"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weight="bold" style:font-weight-asian="bold" style:font-weight-complex="bold"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weight="bold" style:font-weight-asian="bold" style:font-weight-complex="bold"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weight="bold" style:font-weight-asian="bold" style:font-weight-complex="bold" fo:font-size="14pt" style:font-size-asian="14pt" style:font-size-complex="14pt"/>
    </style:style>
    <style:style style:name="P36" style:parent-style-name="Normal" style:family="paragraph">
      <style:text-properties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weight="bold" style:font-weight-asian="bold" style:font-weight-complex="bold"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weight="bold" style:font-weight-asian="bold" style:font-weight-complex="bold"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weight="bold" style:font-weight-asian="bold" style:font-weight-complex="bold"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weight="bold" style:font-weight-asian="bold" style:font-weight-complex="bold"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weight="bold" style:font-weight-asian="bold" style:font-weight-complex="bold" fo:font-size="14pt" style:font-size-asian="14pt" style:font-size-complex="14pt"/>
    </style:style>
    <style:style style:name="T54" style:parent-style-name="DefaultParagraphFont" style:family="text">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weight="bold" style:font-weight-asian="bold" style:font-weight-complex="bold" fo:font-size="14pt" style:font-size-asian="14pt" style:font-size-complex="14pt"/>
    </style:style>
    <style:style style:name="P57" style:parent-style-name="Normal" style:family="paragraph">
      <style:text-properties fo:font-size="14pt" style:font-size-asian="14pt" style:font-size-complex="14pt"/>
    </style:style>
    <style:style style:name="T58" style:parent-style-name="DefaultParagraphFont" style:family="text">
      <style:text-properties fo:font-weight="bold" style:font-weight-asian="bold" style:font-weight-complex="bold"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weight="bold" style:font-weight-asian="bold" style:font-weight-complex="bold" fo:font-size="14pt" style:font-size-asian="14pt" style:font-size-complex="14pt"/>
    </style:style>
    <style:style style:name="T61" style:parent-style-name="DefaultParagraphFont" style:family="text">
      <style:text-properties fo:font-size="14pt" style:font-size-asian="14pt" style:font-size-complex="14pt"/>
    </style:style>
    <style:style style:name="T62" style:parent-style-name="DefaultParagraphFont" style:family="text">
      <style:text-properties fo:font-weight="bold" style:font-weight-asian="bold" style:font-weight-complex="bold" fo:font-size="14pt" style:font-size-asian="14pt" style:font-size-complex="14pt"/>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weight="bold" style:font-weight-asian="bold" style:font-weight-complex="bold" fo:font-size="14pt" style:font-size-asian="14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weight="bold" style:font-weight-asian="bold" style:font-weight-complex="bold"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weight="bold" style:font-weight-asian="bold" style:font-weight-complex="bold"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weight="bold" style:font-weight-asian="bold" style:font-weight-complex="bold"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weight="bold" style:font-weight-asian="bold" style:font-weight-complex="bold" fo:font-size="14pt" style:font-size-asian="14pt" style:font-size-complex="14pt"/>
    </style:style>
    <style:style style:name="T74" style:parent-style-name="DefaultParagraphFont" style:family="text">
      <style:text-properties fo:font-size="14pt" style:font-size-asian="14pt" style:font-size-complex="14pt"/>
    </style:style>
    <style:style style:name="P75" style:parent-style-name="Normal" style:family="paragraph">
      <style:text-properties fo:font-weight="bold" style:font-weight-asian="bold" style:font-weight-complex="bold" fo:font-size="14pt" style:font-size-asian="14pt" style:font-size-complex="14pt"/>
    </style:style>
    <style:style style:name="P76" style:parent-style-name="Normal" style:family="paragraph">
      <style:text-properties fo:font-weight="bold" style:font-weight-asian="bold" style:font-weight-complex="bold"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text-properties fo:font-size="16pt" style:font-size-asian="16pt" style:font-size-complex="16pt"/>
    </style:style>
  </office:automatic-styles>
  <office:body>
    <office:text text:use-soft-page-breaks="true">
      <text:p text:style-name="P1">Introduction to A.I</text:p>
      <text:p text:style-name="P2">Name: Dionne Jude Nunez</text:p>
      <text:p text:style-name="P3">Internship Day 2</text:p>
      <text:p text:style-name="P4">Date: 20/01/2026</text:p>
      <text:p text:style-name="P5"/>
      <text:p text:style-name="P6">Artificial Intelligence (AI)</text:p>
      <text:p text:style-name="P7">Artificial Intelligence (AI) is a branch of computer science that focuses on creating systems capable of performing tasks that usually require human intelligence. Applications and devices equipped with AI can see and identify objects. They can understand and respond to human language. They can learn from new information and experience. They can make detailed recommendations to users and<text:s/>experts. They can act independently, replacing the need for human intelligence or intervention.</text:p>
      <text:p text:style-name="P8"/>
      <text:p text:style-name="P9">Applications of Artificial Intelligence</text:p>
      <text:p text:style-name="P10">AI is used in almost every industry. Some of its major applications include:</text:p>
      <text:p text:style-name="Normal"><text:span text:style-name="T11">1. Healthcare:<text:s/></text:span><text:span text:style-name="T12">AI assists doctors in diagnosing diseases, analyzing medical images, developing new medicines, and monitoring patients. AI-powered systems can detect diseases like cancer at early stages and improve patient care.</text:span></text:p>
      <text:p text:style-name="Normal"><text:span text:style-name="T13">2. Education:<text:s/></text:span><text:span text:style-name="T14">Educational platforms use AI to provide personalized<text:s/></text:span><text:span text:style-name="T15">learning experiences, automated grading, language translation, and virtual tutors that help students learn more effectively.</text:span></text:p>
      <text:p text:style-name="Normal"><text:span text:style-name="T16">3. Banking and Finance:<text:s/></text:span><text:span text:style-name="T17">Banks use AI to detect fraud, assess credit risks, automate customer support through chatbots, and analyze financial data for better investment decisions.</text:span></text:p>
      <text:soft-page-break/>
      <text:p text:style-name="Normal"><text:span text:style-name="T18">4. Transportation:<text:s/></text:span><text:span text:style-name="T19">AI powers navigation systems, traffic prediction, route optimization, and autonomous (self-driving) vehicles.</text:span></text:p>
      <text:p text:style-name="Normal"><text:span text:style-name="T20">5. Manufacturing:<text:s/></text:span><text:span text:style-name="T21">Factories use AI-powered robots for product assembly, quality</text:span><text:span text:style-name="T22"><text:s/>inspection, predictive maintenance, and inventory management.</text:span></text:p>
      <text:p text:style-name="Normal"><text:span text:style-name="T23">6. Agriculture:<text:s/></text:span><text:span text:style-name="T24">Farmers use AI to monitor crops, predict weather conditions, detect plant diseases, and improve irrigation systems.</text:span></text:p>
      <text:p text:style-name="Normal"><text:span text:style-name="T25">7. Retail and E-commerce:<text:s/></text:span><text:span text:style-name="T26">Online shopping platforms recommend products based on customer preferences, manage inventory, and improve customer service through AI chatbots.</text:span></text:p>
      <text:p text:style-name="Normal"><text:span text:style-name="T27">8. Entertainment:<text:s/></text:span><text:span text:style-name="T28">Streaming services recommend movies and songs based on user preferences. AI is also used in gaming, animation, and content<text:s/></text:span><text:span text:style-name="T29">creation.</text:span></text:p>
      <text:p text:style-name="Normal"><text:span text:style-name="T30">9. Cybersecurity:<text:s/></text:span><text:span text:style-name="T31">AI helps identify cyber threats, detect unusual activities, and protect sensitive information from hackers.</text:span></text:p>
      <text:p text:style-name="Normal"><text:span text:style-name="T32">10. Everyday Life:<text:s/></text:span><text:span text:style-name="T33">Virtual assistants like Siri, Google Assistant, and Alexa, language translators, email spam filters, and facial recognition systems all rely on AI technology.<text:s/></text:span></text:p>
      <text:p text:style-name="P34"/>
      <text:p text:style-name="P35">Advantages of Artificial Intelligence:</text:p>
      <text:p text:style-name="P36">AI provides numerous benefits to individuals, businesses, and society.</text:p>
      <text:p text:style-name="Normal"><text:span text:style-name="T37">Increased Efficiency:<text:s/></text:span><text:span text:style-name="T38">AI can perform repetitive tasks quickly and accurately, saving<text:s/></text:span><text:span text:style-name="T39">both time and effort.</text:span></text:p>
      <text:p text:style-name="Normal"><text:span text:style-name="T40">Reduced Human Error:<text:s/></text:span><text:span text:style-name="T41">AI systems can minimize mistakes in areas such as medical diagnosis, financial calculations, and manufacturing.</text:span></text:p>
      <text:p text:style-name="Normal"><text:span text:style-name="T42">24/7 Availability:<text:s/></text:span><text:span text:style-name="T43">Unlike humans, AI systems can work continuously without fatigue or breaks.</text:span></text:p>
      <text:soft-page-break/>
      <text:p text:style-name="Normal"><text:span text:style-name="T44">Better Decision-Making:<text:s/></text:span><text:span text:style-name="T45">AI analyzes large amounts of data rapidly, helping organizations make informed decisions.</text:span></text:p>
      <text:p text:style-name="Normal"><text:span text:style-name="T46">Improved Productivity:<text:s/></text:span><text:span text:style-name="T47">By automating routine work, AI allows people to focus on creative and strategic tasks.</text:span></text:p>
      <text:p text:style-name="Normal"><text:span text:style-name="T48">Personalized Services:<text:s/></text:span><text:span text:style-name="T49">AI recommends<text:s/></text:span><text:span text:style-name="T50">products, music, movies, and learning materials according to individual preferences.</text:span></text:p>
      <text:p text:style-name="Normal"><text:span text:style-name="T51">Enhanced Safety:<text:s/></text:span><text:span text:style-name="T52">AI performs dangerous jobs such as bomb disposal, disaster response, mining, and space exploration, reducing risks to human workers.</text:span></text:p>
      <text:p text:style-name="Normal"><text:span text:style-name="T53">Scientific Advancement:<text:s/></text:span><text:span text:style-name="T54">AI accelerates research in medicine, climate science, engineering, and many other fields by analyzing complex data faster than traditional methods.<text:s/></text:span></text:p>
      <text:p text:style-name="P55"/>
      <text:p text:style-name="P56">Disadvantages of Artificial Intelligence</text:p>
      <text:p text:style-name="P57">Despite its many advantages, AI also presents several<text:s/>challenges.</text:p>
      <text:p text:style-name="Normal"><text:span text:style-name="T58">Job Displacement:<text:s/></text:span><text:span text:style-name="T59">Automation may replace certain repetitive jobs, requiring workers to develop new skills.</text:span></text:p>
      <text:p text:style-name="Normal"><text:span text:style-name="T60">High Development Cost:<text:s/></text:span><text:span text:style-name="T61">Building and maintaining AI systems requires expensive hardware, software, and skilled professionals.</text:span></text:p>
      <text:p text:style-name="Normal"><text:span text:style-name="T62">Privacy Concerns:<text:s/></text:span><text:span text:style-name="T63">AI systems often collect large amounts of personal data, raising concerns about data security and privacy.</text:span></text:p>
      <text:p text:style-name="Normal"><text:span text:style-name="T64">Bias and Fairness:<text:s/></text:span><text:span text:style-name="T65">AI models may produce biased results if they are trained using biased or incomplete data.</text:span></text:p>
      <text:p text:style-name="Normal"><text:span text:style-name="T66">Lack of Human Emotions:<text:s/></text:span><text:span text:style-name="T67">AI cannot<text:s/></text:span><text:span text:style-name="T68">genuinely understand emotions, empathy, or human relationships.</text:span></text:p>
      <text:p text:style-name="Normal"><text:span text:style-name="T69">Cybersecurity Risks:<text:s/></text:span><text:span text:style-name="T70">AI technologies can also be misused for cyberattacks, misinformation, or creating fake content (deepfakes).</text:span></text:p>
      <text:soft-page-break/>
      <text:p text:style-name="Normal"><text:span text:style-name="T71">Limited Creativity and Judgment:<text:s/></text:span><text:span text:style-name="T72">Although AI can generate content, it lacks true human creativity, ethical reasoning, and common sense in many situations.</text:span></text:p>
      <text:p text:style-name="Normal"><text:span text:style-name="T73">Dependence on Technology:<text:s/></text:span><text:span text:style-name="T74">Overreliance on AI may reduce human problem-solving abilities and critical thinking skills.</text:span></text:p>
      <text:p text:style-name="P75"/>
      <text:p text:style-name="P76">Future of AI</text:p>
      <text:p text:style-name="P77">The future of AI is promising<text:s/>and is expected to transform nearly every aspect of society. AI systems will become more intelligent, efficient, and integrated into daily life. Future developments may include:</text:p>
      <text:p text:style-name="P78"/>
      <text:p text:style-name="P79">More advanced healthcare with earlier disease detection and personalized treatment.</text:p>
      <text:p text:style-name="P80">Smarter cities that optimize traffic, energy use, and public services.</text:p>
      <text:p text:style-name="P81">Improved education through highly personalized learning systems.</text:p>
      <text:p text:style-name="P82">More capable robots assisting in homes, hospitals, and industries.</text:p>
      <text:p text:style-name="P83">Increased use of AI in scientific research and<text:s/>climate change solutions.</text:p>
      <text:p text:style-name="P84">Better collaboration between humans and AI rather than complete replacement of human workers.</text:p>
      <text:p text:style-name="P85"/>
      <text:p text:style-name="P86"/>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onne Jude Nunez</meta:initial-creator>
    <dc:creator>Dionne Jude Nunez</dc:creator>
    <meta:creation-date>2026-07-21T06:40:00Z</meta:creation-date>
    <dc:date>2026-07-21T06:40:00Z</dc:date>
    <meta:template xlink:href="Normal" xlink:type="simple"/>
    <meta:editing-cycles>2</meta:editing-cycles>
    <meta:editing-duration>PT0S</meta:editing-duration>
    <meta:document-statistic meta:page-count="4" meta:paragraph-count="10" meta:word-count="777" meta:character-count="5200" meta:row-count="36" meta:non-whitespace-character-count="4433"/>
  </office:meta>
</office:document-meta>
</file>